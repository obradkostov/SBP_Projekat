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7bcd"/>
    </style:style>
    <style:style style:name="P2" style:family="paragraph" style:parent-style-name="Standard">
      <style:text-properties officeooo:paragraph-rsid="00127f7e"/>
    </style:style>
    <style:style style:name="P3" style:family="paragraph" style:parent-style-name="Standard">
      <style:text-properties officeooo:paragraph-rsid="001658a8"/>
    </style:style>
    <style:style style:name="P4" style:family="paragraph" style:parent-style-name="Standard">
      <style:text-properties officeooo:paragraph-rsid="00166fda"/>
    </style:style>
    <style:style style:name="P5" style:family="paragraph" style:parent-style-name="Standard">
      <style:text-properties officeooo:paragraph-rsid="00172fbb"/>
    </style:style>
    <style:style style:name="P6" style:family="paragraph" style:parent-style-name="Standard">
      <style:text-properties officeooo:paragraph-rsid="00178c24"/>
    </style:style>
    <style:style style:name="T1" style:family="text">
      <style:text-properties style:rfc-language-tag="sr-Latn-RS" fo:language="sr" fo:script="Latn" fo:country="RS" officeooo:rsid="00147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PARKING_ZONA (</text:p>
      <text:p text:style-name="Standard"><text:s text:c="4"/>ID NUMBER GENERATED ALWAYS AS IDENTITY,</text:p>
      <text:p text:style-name="Standard"><text:s text:c="4"/>NAZIV VARCHAR2(100) NOT NULL,</text:p>
      <text:p text:style-name="Standard"><text:s text:c="4"/>GEOGRAFSKO_PODRUCJE VARCHAR2(200),</text:p>
      <text:p text:style-name="Standard"><text:s text:c="4"/>TIP_ZONE VARCHAR2(50) NOT NULL,</text:p>
      <text:p text:style-name="Standard"><text:s text:c="4"/>OSNOVNA_TARIFA NUMBER(10,2),</text:p>
      <text:p text:style-name="Standard"><text:s text:c="4"/>MAX_VREME_ZADRZAVANJA NUMBER,</text:p>
      <text:p text:style-name="Standard"><text:s text:c="4"/>PRAVILA_NAPLATE VARCHAR2(500),</text:p>
      <text:p text:style-name="Standard"><text:s text:c="4"/>CONSTRAINT PK_PARKING_ZONA PRIMARY KEY (ID)</text:p>
      <text:p text:style-name="Standard">);</text:p>
      <text:p text:style-name="Standard">----------------------------------------------------------------------------------------------------------------------------CREATE TABLE FIKSNA_TARIFA (</text:p>
      <text:p text:style-name="P1"><text:s text:c="4"/>ID NUMBER GENERATED ALWAYS AS IDENTITY,</text:p>
      <text:p text:style-name="P1"><text:s text:c="4"/>ZONA_ID NUMBER NOT NULL,</text:p>
      <text:p text:style-name="P1"><text:s text:c="4"/>TIP_DANA VARCHAR2(50) NOT NULL,</text:p>
      <text:p text:style-name="P1"><text:s text:c="4"/>NAZIV_INTERVALA VARCHAR2(100),</text:p>
      <text:p text:style-name="P1"><text:s text:c="4"/>VREME_OD VARCHAR2(10),</text:p>
      <text:p text:style-name="P1"><text:s text:c="4"/>VREME_DO VARCHAR2(10),</text:p>
      <text:p text:style-name="P1"><text:s text:c="4"/>IZNOS_TARIFE NUMBER(10,2) NOT NULL,</text:p>
      <text:p text:style-name="P1"><text:s text:c="4"/>CONSTRAINT PK_FIKSNA_TARIFA PRIMARY KEY (ID),</text:p>
      <text:p text:style-name="P1"><text:s text:c="4"/>CONSTRAINT FK_FT_ZONA FOREIGN KEY (ZONA_ID) REFERENCES <text:s text:c="5"/>PARKING_ZONA(ID)</text:p>
      <text:p text:style-name="P1">); <text:s/></text:p>
      <text:p text:style-name="P1">----------------------------------------------------------------------------------------------------------------------------</text:p>
      <text:p text:style-name="P2">CREATE TABLE DINAMICKA_TARIFA (</text:p>
      <text:p text:style-name="P2"><text:s text:c="4"/>ID NUMBER GENERATED ALWAYS AS IDENTITY,</text:p>
      <text:p text:style-name="P2"><text:s text:c="4"/>ZONA_ID NUMBER NOT NULL,</text:p>
      <text:p text:style-name="P2"><text:s text:c="4"/>POCETAK_VAZENJA DATE NOT NULL,</text:p>
      <text:p text:style-name="P2"><text:s text:c="4"/>KRAJ_VAZENJA DATE NOT NULL,</text:p>
      <text:p text:style-name="P2"><text:s text:c="4"/>RAZLOG_PROMENE VARCHAR2(500),</text:p>
      <text:p text:style-name="P2"><text:s text:c="4"/>INICIJATOR_PROMENE VARCHAR2(100),</text:p>
      <text:p text:style-name="P2"><text:s text:c="4"/>POPUNJENOST_ZONE NUMBER(5,2),</text:p>
      <text:p text:style-name="P2"><text:s text:c="4"/>TRAJANJE_PARKIRANJA NUMBER,</text:p>
      <text:p text:style-name="P2"><text:s text:c="4"/>IZNOS_TARIFE NUMBER(10,2) NOT NULL,</text:p>
      <text:p text:style-name="P2"><text:s text:c="4"/>CONSTRAINT PK_DINAMICKA_TARIFA PRIMARY KEY (ID),</text:p>
      <text:p text:style-name="P2"><text:s text:c="4"/>CONSTRAINT FK_DT_ZONA FOREIGN KEY (ZONA_ID) REFERENCES <text:span text:style-name="T1"><text:s text:c="2"/></text:span>PARKING_ZONA(ID)</text:p>
      <text:p text:style-name="P2">);</text:p>
      <text:p text:style-name="P1">----------------------------------------------------------------------------------------------------------------------------</text:p>
      <text:p text:style-name="P1">CREATE TABLE PARKING_MESTO ( </text:p>
      <text:p text:style-name="P1">ID NUMBER GENERATED ALWAYS AS IDENTITY, </text:p>
      <text:p text:style-name="P1">ZONA_ID NUMBER NOT NULL, </text:p>
      <text:p text:style-name="P1">OZNAKA_MESTA VARCHAR2(20) NOT NULL, </text:p>
      <text:p text:style-name="P1">GEOGRAFSKA_LOKACIJA VARCHAR2(200), </text:p>
      <text:p text:style-name="P1">STATUS VARCHAR2(50) NOT NULL, </text:p>
      <text:p text:style-name="P1">TIP_MESTA VARCHAR2(50) NOT NULL, </text:p>
      <text:p text:style-name="P1">DOZ_DUZINA NUMBER(4,2), </text:p>
      <text:p text:style-name="P1">NATKRIVENOST CHAR(1) CHECK (NATKRIVENOST IN ('D', 'N')), -- D = Da, N = Ne KAMERA_SENZOR VARCHAR2(100), </text:p>
      <text:p text:style-name="P1"><text:soft-page-break/>CONSTRAINT PK_PARKING_MESTO PRIMARY KEY (ID), </text:p>
      <text:p text:style-name="P1">CONSTRAINT FK_PM_ZONA FOREIGN KEY (ZONA_ID) REFERENCES PARKING_ZONA(ID), CONSTRAINT CHK_PM_STATUS CHECK (STATUS IN ('SLOBODNO', 'ZAUZETO', 'REZERVISANO')) </text:p>
      <text:p text:style-name="P1">); </text:p>
      <text:p text:style-name="P1">----------------------------------------------------------------------------------------------------------------------------</text:p>
      <text:p text:style-name="P1">CREATE TABLE MESTO_OSOBE_SA_INVALIDITETOM ( </text:p>
      <text:p text:style-name="P1">PARKING_MESTO_ID NUMBER, </text:p>
      <text:p text:style-name="P1">NIVO_PRISTUPACNOSTI VARCHAR2(100) NOT NULL, </text:p>
      <text:p text:style-name="P1">CONSTRAINT PK_MOSI PRIMARY KEY (PARKING_MESTO_ID), </text:p>
      <text:p text:style-name="P1">CONSTRAINT FK_MOSI_MESTO FOREIGN KEY (PARKING_MESTO_ID) REFERENCES PARKING_MESTO(ID) </text:p>
      <text:p text:style-name="P1">); </text:p>
      <text:p text:style-name="P1">----------------------------------------------------------------------------------------------------------------------------</text:p>
      <text:p text:style-name="P1">CREATE TABLE MESTO_SA_PUNJACEM_ZA_EV ( </text:p>
      <text:p text:style-name="P1">PARKING_MESTO_ID NUMBER, </text:p>
      <text:p text:style-name="P1">SNAGA_PUNJACA NUMBER(5,2), </text:p>
      <text:p text:style-name="P1">TIP_KONEKTORA VARCHAR2(50), </text:p>
      <text:p text:style-name="P1">BROJ_PRIKLJUCAKA NUMBER, </text:p>
      <text:p text:style-name="P1">REZIMI_PUNJENJA VARCHAR2(200), </text:p>
      <text:p text:style-name="P1">CONSTRAINT PK_MPUNJAC PRIMARY KEY (PARKING_MESTO_ID), </text:p>
      <text:p text:style-name="P1">CONSTRAINT FK_MPUNJAC_MESTO FOREIGN KEY (PARKING_MESTO_ID) REFERENCES PARKING_MESTO(ID) </text:p>
      <text:p text:style-name="P1">); </text:p>
      <text:p text:style-name="P1">----------------------------------------------------------------------------------------------------------------------------</text:p>
      <text:p text:style-name="P3">CREATE TABLE SENZOR ( </text:p>
      <text:p text:style-name="P3">ID NUMBER GENERATED ALWAYS AS IDENTITY, </text:p>
      <text:p text:style-name="P3">PARKING_MESTO_ID NUMBER NOT NULL, </text:p>
      <text:p text:style-name="P3">PROIZVODJAC VARCHAR2(100), </text:p>
      <text:p text:style-name="P3">MODEL VARCHAR2(100), </text:p>
      <text:p text:style-name="P3">SERIJSKI_BROJ VARCHAR2(100) NOT NULL, </text:p>
      <text:p text:style-name="P3">DATUM_INSTALACIJE DATE, </text:p>
      <text:p text:style-name="P3">STATUS VARCHAR2(50) NOT NULL, </text:p>
      <text:p text:style-name="P3">TIP_SENZORA VARCHAR2(50) NOT NULL, </text:p>
      <text:p text:style-name="P3">CONSTRAINT PK_SENZOR PRIMARY KEY (ID), </text:p>
      <text:p text:style-name="P3">CONSTRAINT FK_SENZOR_MESTO FOREIGN KEY (PARKING_MESTO_ID) REFERENCES PARKING_MESTO(ID), </text:p>
      <text:p text:style-name="P3">CONSTRAINT UQ_SENZOR_SERIJSKI UNIQUE (SERIJSKI_BROJ) </text:p>
      <text:p text:style-name="P3">); </text:p>
      <text:p text:style-name="P3">----------------------------------------------------------------------------------------------------------------------------</text:p>
      <text:p text:style-name="P3">CREATE TABLE VIDEO_SENZOR ( </text:p>
      <text:p text:style-name="P3">SENZOR_ID NUMBER, </text:p>
      <text:p text:style-name="P3">REZOLUCIJA VARCHAR2(50), </text:p>
      <text:p text:style-name="P3">UGAO_POKRIVANJA NUMBER(5,2), </text:p>
      <text:p text:style-name="P3">PREP_REG_OZNAKA CHAR(1) CHECK (PREP_REG_OZNAKA IN ('D', 'N')), -- D = Da, N = Ne CONSTRAINT PK_VIDEO_SENZOR PRIMARY KEY (SENZOR_ID), </text:p>
      <text:p text:style-name="P3">CONSTRAINT FK_VS_SENZOR FOREIGN KEY (SENZOR_ID) REFERENCES SENZOR(ID) </text:p>
      <text:p text:style-name="P3">); </text:p>
      <text:p text:style-name="P3">----------------------------------------------------------------------------------------------------------------------------</text:p>
      <text:p text:style-name="P3"><text:soft-page-break/>CREATE TABLE DOGADJAJ ( </text:p>
      <text:p text:style-name="P3">ID NUMBER GENERATED ALWAYS AS IDENTITY, </text:p>
      <text:p text:style-name="P3">REDNI_BROJ NUMBER NOT NULL,</text:p>
      <text:p text:style-name="P3">SENZOR_ID NUMBER NOT NULL, </text:p>
      <text:p text:style-name="P3">TIP_DOGADJAJA VARCHAR2(100) NOT NULL, </text:p>
      <text:p text:style-name="P3">VREME_NASTANKA TIMESTAMP NOT NULL, </text:p>
      <text:p text:style-name="P3">OCITANA_VREDNOST VARCHAR2(200), </text:p>
      <text:p text:style-name="P3">NIVO_POUZDANOSTI NUMBER(5,2), </text:p>
      <text:p text:style-name="P3">POTVRDA VARCHAR2(200), </text:p>
      <text:p text:style-name="P3">CONSTRAINT PK_DOGADJAJ PRIMARY KEY (ID), </text:p>
      <text:p text:style-name="P3">CONSTRAINT FK_DOGADJAJ_SENZOR FOREIGN KEY (SENZOR_ID) REFERENCES SENZOR(ID) </text:p>
      <text:p text:style-name="P3">); </text:p>
      <text:p text:style-name="P3">----------------------------------------------------------------------------------------------------------------------------</text:p>
      <text:p text:style-name="P4">CREATE TABLE KORISNIK ( </text:p>
      <text:p text:style-name="P4">ID NUMBER GENERATED ALWAYS AS IDENTITY, </text:p>
      <text:p text:style-name="P4">EMAIL VARCHAR2(100), </text:p>
      <text:p text:style-name="P4">ADRESA VARCHAR2(200), </text:p>
      <text:p text:style-name="P4">STATUS_NALOGA VARCHAR2(50) NOT NULL, </text:p>
      <text:p text:style-name="P4">CONSTRAINT PK_KORISNIK PRIMARY KEY (ID), </text:p>
      <text:p text:style-name="P4">CONSTRAINT CHK_KORISNIK_STATUS CHECK (STATUS_NALOGA IN ('AKTIVAN', 'BLOKIRAN', 'NEVERIFIKOVAN')) </text:p>
      <text:p text:style-name="P4">); </text:p>
      <text:p text:style-name="P4">----------------------------------------------------------------------------------------------------------------------------</text:p>
      <text:p text:style-name="P4">CREATE TABLE TELEFON ( </text:p>
      <text:p text:style-name="P4">ID NUMBER GENERATED ALWAYS AS IDENTITY, </text:p>
      <text:p text:style-name="P4">KORISNIK_ID NUMBER NOT NULL, </text:p>
      <text:p text:style-name="P4">BROJ_TELEFONA VARCHAR2(30) NOT NULL, </text:p>
      <text:p text:style-name="P4">CONSTRAINT PK_TELEFON PRIMARY KEY (ID), </text:p>
      <text:p text:style-name="P4">CONSTRAINT FK_TEL_KORISNIK FOREIGN KEY (KORISNIK_ID) REFERENCES KORISNIK(ID) </text:p>
      <text:p text:style-name="P4">); </text:p>
      <text:p text:style-name="P4">----------------------------------------------------------------------------------------------------------------------------</text:p>
      <text:p text:style-name="P5">CREATE TABLE FIZICKO_LICE ( </text:p>
      <text:p text:style-name="P5">KORISNIK_ID NUMBER, </text:p>
      <text:p text:style-name="P5">IME VARCHAR2(50) NOT NULL, </text:p>
      <text:p text:style-name="P5">PREZIME VARCHAR2(50) NOT NULL, </text:p>
      <text:p text:style-name="P5">JMBG VARCHAR2(13), </text:p>
      <text:p text:style-name="P5">CONSTRAINT PK_FIZICKO_LICE PRIMARY KEY (KORISNIK_ID), </text:p>
      <text:p text:style-name="P5">CONSTRAINT FK_FL_KORISNIK FOREIGN KEY (KORISNIK_ID) REFERENCES KORISNIK(ID), </text:p>
      <text:p text:style-name="P5">CONSTRAINT UQ_FL_JMBG UNIQUE (JMBG) </text:p>
      <text:p text:style-name="P5">); </text:p>
      <text:p text:style-name="P5">----------------------------------------------------------------------------------------------------------------------------</text:p>
      <text:p text:style-name="P5">CREATE TABLE PRAVNO_LICE ( </text:p>
      <text:p text:style-name="P5">KORISNIK_ID NUMBER, </text:p>
      <text:p text:style-name="P5">NAZIV VARCHAR2(150) NOT NULL, </text:p>
      <text:p text:style-name="P5">PIB VARCHAR2(9) NOT NULL, </text:p>
      <text:p text:style-name="P5">MATICNI_BROJ VARCHAR2(8) NOT NULL, </text:p>
      <text:p text:style-name="P5"><text:soft-page-break/>KONTAKT_OSOBA VARCHAR2(100), </text:p>
      <text:p text:style-name="P5">SEDISTE VARCHAR2(200), </text:p>
      <text:p text:style-name="P5">CONSTRAINT PK_PRAVNO_LICE PRIMARY KEY (KORISNIK_ID), </text:p>
      <text:p text:style-name="P5">CONSTRAINT FK_PL_KORISNIK FOREIGN KEY (KORISNIK_ID) REFERENCES KORISNIK(ID), </text:p>
      <text:p text:style-name="P5">CONSTRAINT UQ_PL_PIB UNIQUE (PIB), </text:p>
      <text:p text:style-name="P5">CONSTRAINT UQ_PL_MB UNIQUE (MATICNI_BROJ) </text:p>
      <text:p text:style-name="P5">); </text:p>
      <text:p text:style-name="P5">----------------------------------------------------------------------------------------------------------------------------</text:p>
      <text:p text:style-name="P5">CREATE TABLE VOZILO ( </text:p>
      <text:p text:style-name="P5">REGISTARSKA_OZNAKA VARCHAR2(20), </text:p>
      <text:p text:style-name="P5">KORISNIK_ID NUMBER NOT NULL, </text:p>
      <text:p text:style-name="P5">DRZAVA_REGISTRACIJE VARCHAR2(50) NOT NULL, </text:p>
      <text:p text:style-name="P5">MARKA VARCHAR2(50), </text:p>
      <text:p text:style-name="P5">MODEL VARCHAR2(50), </text:p>
      <text:p text:style-name="P5">TIP_VOZILA VARCHAR2(50), </text:p>
      <text:p text:style-name="P5">DIMENZIJE VARCHAR2(50), </text:p>
      <text:p text:style-name="P5">POGON VARCHAR2(50), </text:p>
      <text:p text:style-name="P5">CONSTRAINT PK_VOZILO PRIMARY KEY (REGISTARSKA_OZNAKA), </text:p>
      <text:p text:style-name="P5">CONSTRAINT FK_VOZILO_KORISNIK FOREIGN KEY (KORISNIK_ID) REFERENCES KORISNIK(ID) </text:p>
      <text:p text:style-name="P5">); </text:p>
      <text:p text:style-name="P5">----------------------------------------------------------------------------------------------------------------------------</text:p>
      <text:p text:style-name="P5">CREATE TABLE PRETPLATNA_KARTA ( </text:p>
      <text:p text:style-name="P5">ID NUMBER GENERATED ALWAYS AS IDENTITY, </text:p>
      <text:p text:style-name="P5">KORISNIK_ID NUMBER NOT NULL, </text:p>
      <text:p text:style-name="P5">TIP_PRETPLATE VARCHAR2(50) NOT NULL, </text:p>
      <text:p text:style-name="P5">POCETAK_VAZENJA DATE NOT NULL, </text:p>
      <text:p text:style-name="P5">KRAJ_VAZENJA DATE NOT NULL, </text:p>
      <text:p text:style-name="P5">CENA NUMBER(10,2) NOT NULL, </text:p>
      <text:p text:style-name="P5">MAKS_BR_VOZILA NUMBER DEFAULT 1, </text:p>
      <text:p text:style-name="P5">CONSTRAINT PK_PRETPLATNA_KARTA PRIMARY KEY (ID), </text:p>
      <text:p text:style-name="P5">CONSTRAINT FK_PK_KORISNIK FOREIGN KEY (KORISNIK_ID) REFERENCES KORISNIK(ID) </text:p>
      <text:p text:style-name="P5">); </text:p>
      <text:p text:style-name="P5">----------------------------------------------------------------------------------------------------------------------------</text:p>
      <text:p text:style-name="P6">CREATE TABLE PRETPLATNA_KARTA_ZONE ( </text:p>
      <text:p text:style-name="P6">ID NUMBER GENERATED ALWAYS AS IDENTITY, </text:p>
      <text:p text:style-name="P6">KARTA_ID NUMBER NOT NULL, </text:p>
      <text:p text:style-name="P6">ZONA_ID NUMBER NOT NULL, </text:p>
      <text:p text:style-name="P6">CONSTRAINT PK_PK_ZONE PRIMARY KEY (ID), </text:p>
      <text:p text:style-name="P6">CONSTRAINT FK_PKZ_KARTA FOREIGN KEY (KARTA_ID) REFERENCES PRETPLATNA_KARTA(ID), </text:p>
      <text:p text:style-name="P6">CONSTRAINT FK_PKZ_ZONA FOREIGN KEY (ZONA_ID) REFERENCES PARKING_ZONA(ID), </text:p>
      <text:p text:style-name="P6">CONSTRAINT UQ_KARTA_ZONA UNIQUE (KARTA_ID, ZONA_ID) </text:p>
      <text:p text:style-name="P6">); </text:p>
      <text:p text:style-name="P6">----------------------------------------------------------------------------------------------------------------------------</text:p>
      <text:p text:style-name="P6">CREATE TABLE PARKIRANJE ( </text:p>
      <text:p text:style-name="P6"><text:soft-page-break/>ID NUMBER GENERATED ALWAYS AS IDENTITY, </text:p>
      <text:p text:style-name="P6">REGISTARSKA_OZNAKA VARCHAR2(20) NOT NULL, </text:p>
      <text:p text:style-name="P6">PARKING_MESTO_ID NUMBER NOT NULL, </text:p>
      <text:p text:style-name="P6">ZONA_ID NUMBER NOT NULL, </text:p>
      <text:p text:style-name="P6">DATUM_VREME_POCETKA TIMESTAMP NOT NULL, </text:p>
      <text:p text:style-name="P6">OBRACUNATI_IZNOS NUMBER(10,2) NOT NULL, </text:p>
      <text:p text:style-name="P6">KARTA_ID NUMBER, </text:p>
      <text:p text:style-name="P6">CONSTRAINT PK_PARKIRANJE PRIMARY KEY (ID), </text:p>
      <text:p text:style-name="P6">CONSTRAINT FK_PARK_VOZILO FOREIGN KEY (REGISTARSKA_OZNAKA) REFERENCES VOZILO(REGISTARSKA_OZNAKA), </text:p>
      <text:p text:style-name="P6">CONSTRAINT FK_PARK_MESTO FOREIGN KEY (PARKING_MESTO_ID) REFERENCES PARKING_MESTO(ID), </text:p>
      <text:p text:style-name="P6">CONSTRAINT FK_PARK_ZONA FOREIGN KEY (ZONA_ID) REFERENCES PARKING_ZONA(ID), </text:p>
      <text:p text:style-name="P6">CONSTRAINT FK_PARK_KARTA FOREIGN KEY (KARTA_ID) REFERENCES PRETPLATNA_KARTA(ID) </text:p>
      <text:p text:style-name="P6">); </text:p>
      <text:p text:style-name="P5"/>
      <text:p text:style-name="P5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09:51:46.199262500</meta:creation-date>
    <dc:date>2026-06-05T10:57:55.474701700</dc:date>
    <meta:editing-duration>PT41M20S</meta:editing-duration>
    <meta:editing-cycles>7</meta:editing-cycles>
    <meta:generator>LibreOffice/25.2.7.1$Windows_X86_64 LibreOffice_project/16e8e36d1610f10597ed778c3dcb0a5aa0ed5d6f</meta:generator>
    <meta:document-statistic meta:table-count="0" meta:image-count="0" meta:object-count="0" meta:page-count="5" meta:paragraph-count="190" meta:word-count="716" meta:character-count="8474" meta:non-whitespace-character-count="7688"/>
  </office:meta>
</office:document-meta>
</file>