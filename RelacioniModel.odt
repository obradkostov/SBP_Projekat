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5c9a"/>
    </style:style>
    <style:style style:name="P2" style:family="paragraph" style:parent-style-name="Text_20_body">
      <style:text-properties style:font-name="Google Sans Text" officeooo:paragraph-rsid="00049f92"/>
    </style:style>
    <style:style style:name="P3" style:family="paragraph" style:parent-style-name="Standard">
      <style:text-properties officeooo:paragraph-rsid="00049f92"/>
    </style:style>
    <style:style style:name="P4" style:family="paragraph" style:parent-style-name="Standard">
      <style:text-properties officeooo:paragraph-rsid="00085805"/>
    </style:style>
    <style:style style:name="P5" style:family="paragraph" style:parent-style-name="Standard">
      <style:paragraph-properties fo:text-align="justify" style:justify-single-word="false"/>
      <style:text-properties officeooo:paragraph-rsid="00049f92"/>
    </style:style>
    <style:style style:name="P6" style:family="paragraph" style:parent-style-name="Standard">
      <style:text-properties officeooo:paragraph-rsid="0005ffc9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text-underline-style="solid" style:text-underline-width="auto" style:text-underline-color="font-color"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Google Sans Text" fo:font-weight="normal" style:font-weight-asian="normal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style-complex="italic"/>
    </style:style>
    <style:style style:name="T8" style:family="text">
      <style:text-properties style:font-name="Google Sans Text" fo:font-style="italic" style:text-underline-style="solid" style:text-underline-width="auto" style:text-underline-color="font-color" fo:font-weight="bold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Google Sans Text" fo:font-weight="normal" officeooo:rsid="000e251d" style:font-weight-asian="normal" style:font-weight-complex="normal"/>
    </style:style>
    <style:style style:name="T11" style:family="text">
      <style:text-properties style:font-name="Google Sans Tex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3pt" fo:font-weight="bold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4pt" style:rfc-language-tag="sr-Latn-RS" fo:language="sr" fo:script="Latn" fo:country="RS" fo:font-weight="bold" officeooo:rsid="00085805" style:font-size-asian="14pt" style:font-weight-asian="bold" style:font-size-complex="14pt" style:font-weight-complex="bold"/>
    </style:style>
    <style:style style:name="T15" style:family="text">
      <style:text-properties fo:font-size="12pt" style:rfc-language-tag="sr-Latn-RS" fo:language="sr" fo:script="Latn" fo:country="RS" fo:font-weight="normal" officeooo:rsid="00085805" style:font-size-asian="10.5pt" style:font-weight-asian="normal" style:font-size-complex="12pt" style:font-weight-complex="normal"/>
    </style:style>
    <style:style style:name="T16" style:family="text">
      <style:text-properties fo:font-size="12pt" style:rfc-language-tag="sr-Latn-RS" fo:language="sr" fo:script="Latn" fo:country="RS" style:text-underline-style="solid" style:text-underline-width="auto" style:text-underline-color="font-color" fo:font-weight="bold" officeooo:rsid="00085805" style:font-size-asian="10.5pt" style:font-weight-asian="bold" style:font-size-complex="12pt" style:font-weight-complex="bold"/>
    </style:style>
    <style:style style:name="T17" style:family="text">
      <style:text-properties fo:font-size="12pt" style:rfc-language-tag="sr-Latn-RS" fo:language="sr" fo:script="Latn" fo:country="RS" fo:font-style="italic" fo:font-weight="normal" officeooo:rsid="00085805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style:rfc-language-tag="sr-Latn-RS" fo:language="sr" fo:script="Latn" fo:country="RS" fo:font-weight="normal" officeooo:rsid="000d2eea" style:font-size-asian="10.5pt" style:font-weight-asian="normal" style:font-size-complex="12pt" style:font-weight-complex="normal"/>
    </style:style>
    <style:style style:name="T19" style:family="text">
      <style:text-properties fo:font-size="12pt" style:rfc-language-tag="sr-Latn-RS" fo:language="sr" fo:script="Latn" fo:country="RS" fo:font-style="normal" fo:font-weight="normal" officeooo:rsid="00085805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Google Sans Tex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style:rfc-language-tag="sr-Latn-RS" fo:language="sr" fo:script="Latn" fo:country="RS" fo:font-style="normal" style:text-underline-style="solid" style:text-underline-width="auto" style:text-underline-color="font-color" fo:font-weight="bold" officeooo:rsid="00085805" style:font-style-asian="normal" style:font-weight-asian="bold" style:font-style-complex="normal" style:font-weight-complex="bold"/>
    </style:style>
    <style:style style:name="T22" style:family="text">
      <style:text-properties style:rfc-language-tag="sr-Latn-RS" fo:language="sr" fo:script="Latn" fo:country="RS" officeooo:rsid="00085805"/>
    </style:style>
    <style:style style:name="T23" style:family="text">
      <style:text-properties style:font-name="Google Sans Text"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king_Zona</text:span> (<text:span text:style-name="T2">ID</text:span>,Naziv, Geografsko_Podrucje, Tip_Zone, Osnovna_Tarifa, Max_Vreme_Zadrzavanja, Pravila_Naplate) </text:p>
      <text:p text:style-name="P1"><text:span text:style-name="T3">Fiksna_Tarifa</text:span> (<text:span text:style-name="T4">ID<text:tab/></text:span>,<text:span text:style-name="T5">Zona_ID</text:span>,Tip_Dana, Naziv_Intervala, Vreme_Od,Vreme_Do, Iznos_Tarife) </text:p>
      <text:p text:style-name="P1"><text:span text:style-name="T3">Dinamicka_Tarifa</text:span> (<text:span text:style-name="T4">ID</text:span>, <text:span text:style-name="T5">Zona_ID</text:span>,Pocetak_Vazenja, Kraj_Vazenja, Razlog_Promene, Inicijator_Promene, Popunjenost_Zone, Trajanje_Parkiranja,<text:span text:style-name="T6">Iznos_Tarife</text:span>) <text:tab/></text:p>
      <text:p text:style-name="P2"><text:span text:style-name="T1">Parking_Mesto</text:span> (<text:span text:style-name="T2">ID</text:span>,<text:span text:style-name="T5">Zona_ID</text:span>,Oznaka_Mesta,Geografska_Lokacija,Status, Tip_Mesta, Doz_Duzina,Natkrivenost, Kamera_Senzor)</text:p>
      <text:p text:style-name="P2"><text:span text:style-name="T1">Mesto_Osobe_Sa_Invaliditetom</text:span>(<text:span text:style-name="T7">ID</text:span>, Nivo_Pristupacnosti)</text:p>
      <text:p text:style-name="P2"><text:span text:style-name="T1">Mesto_Sa_Punjacem_Za_EV</text:span>(<text:span text:style-name="T7">ID</text:span>,Snaga_Punjaca,Tip_Konektora,Broj_Prikljucaka, Rezimi_Punjenja)</text:p>
      <text:p text:style-name="P1"><text:span text:style-name="T3">Senzor</text:span>(<text:span text:style-name="T4">ID</text:span>,<text:span text:style-name="T5">Parking_Mesto_ID</text:span>,Proizvodjac,Model,Serijski_Broj,Datum_Instalacije,Status, Tip_Senzora) </text:p>
      <text:p text:style-name="P1"><text:span text:style-name="T3">Video_Senzor</text:span> (<text:span text:style-name="T8">ID</text:span>,Rezolucija,Ugao_Pokrivanja,Prep_Reg_Oznaka) </text:p>
      <text:p text:style-name="P3"><text:span text:style-name="T3">Dogadjaj</text:span> (<text:span text:style-name="T9">ID</text:span><text:span text:style-name="T3">,</text:span><text:span text:style-name="T10">Redni_<text:tab/>Broj,</text:span><text:span text:style-name="T11">Senzor_ID</text:span>, Tip_Dogadjaja, Vreme_Nastanka, Ocitana_Vrednost, Nivo_Pouzdanosti, Potvrda) </text:p>
      <text:p text:style-name="P3"><text:span text:style-name="T12">Korisnik</text:span><text:span text:style-name="T13"> </text:span>(<text:span text:style-name="T2">ID</text:span>, Email, Adresa, Status_Naloga) </text:p>
      <text:p text:style-name="P4"><text:span text:style-name="T14">Telefon</text:span><text:span text:style-name="T15">(</text:span><text:span text:style-name="T16">ID</text:span><text:span text:style-name="T15">,</text:span><text:span text:style-name="T17">Korisnik_ID</text:span><text:span text:style-name="T15">,</text:span><text:span text:style-name="T18">Broj_</text:span><text:span text:style-name="T19">Telefon</text:span><text:span text:style-name="T15">)</text:span> </text:p>
      <text:p text:style-name="P5"><text:span text:style-name="T3">Fizicko_Lice</text:span> (<text:span text:style-name="T20">ID</text:span>, Ime, Prezime, JMBG) </text:p>
      <text:p text:style-name="P3"><text:span text:style-name="T3">Pravno_Lice</text:span> (<text:span text:style-name="T20">ID</text:span>, Naziv, PIB, Maticni_Broj, Kontakt_Osoba, Sediste) </text:p>
      <text:p text:style-name="P3"><text:span text:style-name="T3">Vozilo</text:span> (<text:span text:style-name="T8">Registarska_Oznaka</text:span>, <text:span text:style-name="T5">Korisnik_ID</text:span>, Drzava_Registracije, Marka, Model, Tip_Vozila, Dimenzije, Pogon) </text:p>
      <text:p text:style-name="P3"><text:span text:style-name="T3">Pretplatna_Karta</text:span> (<text:span text:style-name="T8">ID</text:span>, <text:span text:style-name="T5">Korisnik_ID</text:span>, Tip_Pretplate, Pocetak_Vazenja, Kraj_Vazenja, Cena, Maks_Br_Vozila) </text:p>
      <text:p text:style-name="P6"><text:span text:style-name="T3">Pretplatna_Karta_Zone</text:span> (<text:span text:style-name="T21">ID</text:span><text:span text:style-name="T22">,</text:span><text:span text:style-name="T23">Karta_ID</text:span>,<text:span text:style-name="T11">Zona_ID</text:span>)</text:p>
      <text:p text:style-name="P6"><text:span text:style-name="T3">Parkiranje</text:span> (<text:span text:style-name="T8">ID</text:span>, <text:span text:style-name="T11">Registarska_Oznaka</text:span>,<text:span text:style-name="T5">Parking_Mesto_ID</text:span>,<text:span text:style-name="T5">Zona_ID</text:span>, Datum_Vreme_Pocetka, Obracunati_Iznos, <text:span text:style-name="T5">Karta_ID</text:span>) 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9:09:10.379436600</meta:creation-date>
    <dc:date>2026-06-05T09:48:01.360280400</dc:date>
    <meta:editing-duration>PT33M40S</meta:editing-duration>
    <meta:editing-cycles>4</meta:editing-cycles>
    <meta:generator>LibreOffice/25.2.7.1$Windows_X86_64 LibreOffice_project/16e8e36d1610f10597ed778c3dcb0a5aa0ed5d6f</meta:generator>
    <meta:document-statistic meta:table-count="0" meta:image-count="0" meta:object-count="0" meta:page-count="1" meta:paragraph-count="17" meta:word-count="85" meta:character-count="1427" meta:non-whitespace-character-count="1344"/>
  </office:meta>
</office:document-meta>
</file>